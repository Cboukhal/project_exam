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Titre1" style:master-page-name="MP0" style:family="paragraph">
      <style:paragraph-properties fo:break-before="page" fo:margin-top="0in" fo:margin-bottom="0.0972in" fo:line-height="115%"/>
    </style:style>
    <style:style style:name="P2" style:parent-style-name="Titre2" style:family="paragraph">
      <style:paragraph-properties fo:margin-top="0in" fo:margin-bottom="0.0972in" fo:line-height="115%"/>
    </style:style>
    <style:style style:name="P3" style:parent-style-name="HorizontalLine" style:family="paragraph">
      <style:paragraph-properties fo:margin-bottom="0.0972in" fo:line-height="115%"/>
    </style:style>
    <style:style style:name="P4" style:parent-style-name="Titre2" style:family="paragraph">
      <style:paragraph-properties fo:margin-top="0in" fo:margin-bottom="0.0972in" fo:line-height="115%"/>
    </style:style>
    <style:style style:name="P5" style:parent-style-name="Textbody" style:family="paragraph"/>
    <style:style style:name="P6" style:parent-style-name="Textbody" style:family="paragraph"/>
    <style:style style:name="P7" style:parent-style-name="Textbody" style:family="paragraph"/>
    <style:style style:name="P8" style:parent-style-name="Textbody" style:family="paragraph"/>
    <style:style style:name="P9" style:parent-style-name="Textbody" style:family="paragraph"/>
    <style:style style:name="P10" style:parent-style-name="HorizontalLine" style:family="paragraph">
      <style:paragraph-properties fo:margin-bottom="0.0972in" fo:line-height="115%"/>
    </style:style>
    <style:style style:name="P11" style:parent-style-name="Titre2" style:family="paragraph">
      <style:paragraph-properties fo:margin-top="0in" fo:margin-bottom="0.0972in" fo:line-height="115%"/>
    </style:style>
    <style:style style:name="P12" style:parent-style-name="Titre3" style:family="paragraph">
      <style:paragraph-properties fo:margin-top="0in" fo:margin-bottom="0.0972in" fo:line-height="115%"/>
    </style:style>
    <style:style style:name="P13" style:parent-style-name="Textbody" style:family="paragraph"/>
    <style:style style:name="P14" style:parent-style-name="Textbody" style:family="paragraph"/>
    <style:style style:name="P15" style:parent-style-name="Textbody" style:family="paragraph"/>
    <style:style style:name="P16" style:parent-style-name="Textbody" style:family="paragraph"/>
    <style:style style:name="P17" style:parent-style-name="Textbody" style:family="paragraph"/>
    <style:style style:name="P18" style:parent-style-name="Titre3" style:family="paragraph">
      <style:paragraph-properties fo:margin-top="0in" fo:margin-bottom="0.0972in" fo:line-height="115%"/>
    </style:style>
    <style:style style:name="P19" style:parent-style-name="Textbody" style:family="paragraph"/>
    <style:style style:name="P20" style:parent-style-name="Textbody" style:family="paragraph"/>
    <style:style style:name="P21" style:parent-style-name="Textbody" style:family="paragraph"/>
    <style:style style:name="P22" style:parent-style-name="HorizontalLine" style:family="paragraph">
      <style:paragraph-properties fo:margin-bottom="0.0972in" fo:line-height="115%"/>
    </style:style>
    <style:style style:name="P23" style:parent-style-name="Titre2" style:family="paragraph">
      <style:paragraph-properties fo:margin-top="0in" fo:margin-bottom="0.0972in" fo:line-height="115%"/>
    </style:style>
    <style:style style:name="P24" style:parent-style-name="Textbody" style:family="paragraph">
      <style:paragraph-properties fo:text-indent="0.2958in"/>
    </style:style>
    <style:style style:name="P25" style:parent-style-name="Textbody" style:family="paragraph">
      <style:paragraph-properties fo:margin-left="0.2958in">
        <style:tab-stops/>
      </style:paragraph-properties>
    </style:style>
    <style:style style:name="P26" style:parent-style-name="Textbody" style:family="paragraph">
      <style:paragraph-properties fo:margin-left="0.2958in">
        <style:tab-stops/>
      </style:paragraph-properties>
    </style:style>
    <style:style style:name="T27" style:parent-style-name="Élevé" style:family="text">
      <style:text-properties fo:font-weight="bold" style:font-weight-asian="bold" style:font-weight-complex="bold"/>
    </style:style>
    <style:style style:name="T28" style:parent-style-name="Élevé" style:family="text">
      <style:text-properties fo:font-weight="bold" style:font-weight-asian="bold" style:font-weight-complex="bold"/>
    </style:style>
    <style:style style:name="P29" style:parent-style-name="NormalWeb" style:family="paragraph"/>
    <style:style style:name="P30" style:parent-style-name="NormalWeb" style:family="paragraph"/>
    <style:style style:name="P31" style:parent-style-name="NormalWeb" style:family="paragraph"/>
    <style:style style:name="T32" style:parent-style-name="Élevé" style:family="text">
      <style:text-properties fo:font-weight="bold" style:font-weight-asian="bold" style:font-weight-complex="bold"/>
    </style:style>
    <style:style style:name="TableColumn34" style:family="table-column">
      <style:table-column-properties style:column-width="2.1444in"/>
    </style:style>
    <style:style style:name="TableColumn35" style:family="table-column">
      <style:table-column-properties style:column-width="1.2916in"/>
    </style:style>
    <style:style style:name="TableColumn36" style:family="table-column">
      <style:table-column-properties style:column-width="0.9972in"/>
    </style:style>
    <style:style style:name="TableColumn37" style:family="table-column">
      <style:table-column-properties style:column-width="1.0076in"/>
    </style:style>
    <style:style style:name="Table33" style:family="table">
      <style:table-properties style:width="5.4409in" fo:margin-left="0in" table:align="left"/>
    </style:style>
    <style:style style:name="TableRow38" style:family="table-row">
      <style:table-row-properties/>
    </style:style>
    <style:style style:name="TableCell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Row47" style:family="table-row">
      <style:table-row-properties/>
    </style:style>
    <style:style style:name="TableCell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2" style:family="table-row">
      <style:table-row-properties/>
    </style:style>
    <style:style style:name="TableCell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7" style:family="table-row">
      <style:table-row-properties/>
    </style:style>
    <style:style style:name="TableCell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2" style:family="table-row">
      <style:table-row-properties/>
    </style:style>
    <style:style style:name="TableCell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7" style:family="table-row">
      <style:table-row-properties/>
    </style:style>
    <style:style style:name="TableCell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2" style:family="table-row">
      <style:table-row-properties/>
    </style:style>
    <style:style style:name="TableCell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7" style:family="table-row">
      <style:table-row-properties/>
    </style:style>
    <style:style style:name="TableCell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82" style:parent-style-name="Élevé" style:family="text">
      <style:text-properties fo:font-weight="bold" style:font-weight-asian="bold" style:font-weight-complex="bold"/>
    </style:style>
    <style:style style:name="P83" style:parent-style-name="NormalWeb" style:family="paragraph"/>
    <style:style style:name="P84" style:parent-style-name="NormalWeb" style:family="paragraph"/>
    <style:style style:name="P85" style:parent-style-name="NormalWeb" style:family="paragraph"/>
    <style:style style:name="P86" style:parent-style-name="NormalWeb" style:family="paragraph"/>
    <style:style style:name="P87" style:parent-style-name="NormalWeb" style:family="paragraph"/>
    <style:style style:name="P88" style:parent-style-name="NormalWeb" style:family="paragraph"/>
    <style:style style:name="P89" style:parent-style-name="NormalWeb" style:family="paragraph"/>
    <style:style style:name="P90" style:parent-style-name="NormalWeb" style:family="paragraph"/>
    <style:style style:name="P91" style:parent-style-name="NormalWeb" style:family="paragraph"/>
    <style:style style:name="T92" style:parent-style-name="Élevé" style:family="text">
      <style:text-properties fo:font-weight="bold" style:font-weight-asian="bold" style:font-weight-complex="bold"/>
    </style:style>
    <style:style style:name="T93" style:parent-style-name="Élevé" style:family="text">
      <style:text-properties fo:font-weight="bold" style:font-weight-asian="bold" style:font-weight-complex="bold"/>
    </style:style>
    <style:style style:name="P94" style:parent-style-name="NormalWeb" style:family="paragraph"/>
    <style:style style:name="P95" style:parent-style-name="NormalWeb" style:family="paragraph"/>
    <style:style style:name="P96" style:parent-style-name="NormalWeb" style:family="paragraph"/>
    <style:style style:name="P97" style:parent-style-name="NormalWeb" style:family="paragraph"/>
    <style:style style:name="P98" style:parent-style-name="NormalWeb" style:family="paragraph"/>
    <style:style style:name="P99" style:parent-style-name="NormalWeb" style:family="paragraph"/>
    <style:style style:name="T100" style:parent-style-name="Élevé" style:family="text">
      <style:text-properties fo:font-weight="bold" style:font-weight-asian="bold" style:font-weight-complex="bold"/>
    </style:style>
    <style:style style:name="P101" style:parent-style-name="NormalWeb" style:family="paragraph"/>
    <style:style style:name="P102" style:parent-style-name="NormalWeb" style:family="paragraph"/>
    <style:style style:name="P103" style:parent-style-name="NormalWeb" style:family="paragraph"/>
    <style:style style:name="T104" style:parent-style-name="Élevé" style:family="text">
      <style:text-properties fo:font-weight="bold" style:font-weight-asian="bold" style:font-weight-complex="bold"/>
    </style:style>
    <style:style style:name="P105" style:parent-style-name="NormalWeb" style:family="paragraph"/>
    <style:style style:name="P106" style:parent-style-name="NormalWeb" style:family="paragraph"/>
    <style:style style:name="P107" style:parent-style-name="NormalWeb" style:family="paragraph"/>
    <style:style style:name="P108" style:parent-style-name="NormalWeb" style:family="paragraph"/>
    <style:style style:name="T109" style:parent-style-name="Élevé" style:family="text">
      <style:text-properties fo:font-weight="bold" style:font-weight-asian="bold" style:font-weight-complex="bold"/>
    </style:style>
    <style:style style:name="P110" style:parent-style-name="NormalWeb" style:family="paragraph"/>
    <style:style style:name="P111" style:parent-style-name="NormalWeb" style:family="paragraph"/>
    <style:style style:name="P112" style:parent-style-name="NormalWeb" style:family="paragraph"/>
    <style:style style:name="T113" style:parent-style-name="Élevé" style:family="text">
      <style:text-properties fo:font-weight="bold" style:font-weight-asian="bold" style:font-weight-complex="bold"/>
    </style:style>
    <style:style style:name="T114" style:parent-style-name="Élevé" style:family="text">
      <style:text-properties fo:font-weight="bold" style:font-weight-asian="bold" style:font-weight-complex="bold"/>
    </style:style>
    <style:style style:name="P115" style:parent-style-name="NormalWeb" style:family="paragraph"/>
    <style:style style:name="P116" style:parent-style-name="NormalWeb" style:family="paragraph"/>
    <style:style style:name="P117" style:parent-style-name="NormalWeb" style:family="paragraph"/>
    <style:style style:name="P118" style:parent-style-name="NormalWeb" style:family="paragraph"/>
    <style:style style:name="P119" style:parent-style-name="NormalWeb" style:family="paragraph"/>
    <style:style style:name="P120" style:parent-style-name="NormalWeb" style:family="paragraph"/>
    <style:style style:name="P121" style:parent-style-name="NormalWeb" style:family="paragraph"/>
    <style:style style:name="P122" style:parent-style-name="NormalWeb" style:family="paragraph"/>
    <style:style style:name="T123" style:parent-style-name="Élevé" style:family="text">
      <style:text-properties fo:font-weight="bold" style:font-weight-asian="bold" style:font-weight-complex="bold"/>
    </style:style>
    <style:style style:name="P124" style:parent-style-name="NormalWeb" style:family="paragraph"/>
    <style:style style:name="P125" style:parent-style-name="NormalWeb" style:family="paragraph"/>
    <style:style style:name="P126" style:parent-style-name="NormalWeb" style:family="paragraph"/>
    <style:style style:name="P127" style:parent-style-name="NormalWeb" style:family="paragraph"/>
    <style:style style:name="P128" style:parent-style-name="NormalWeb" style:family="paragraph"/>
    <style:style style:name="T129" style:parent-style-name="Élevé" style:family="text">
      <style:text-properties fo:font-weight="bold" style:font-weight-asian="bold" style:font-weight-complex="bold"/>
    </style:style>
    <style:style style:name="P130" style:parent-style-name="NormalWeb" style:family="paragraph"/>
    <style:style style:name="P131" style:parent-style-name="NormalWeb" style:family="paragraph"/>
    <style:style style:name="P132" style:parent-style-name="NormalWeb" style:family="paragraph"/>
    <style:style style:name="T133" style:parent-style-name="Élevé" style:family="text">
      <style:text-properties fo:font-weight="bold" style:font-weight-asian="bold" style:font-weight-complex="bold"/>
    </style:style>
    <style:style style:name="T134" style:parent-style-name="Élevé" style:family="text">
      <style:text-properties fo:font-weight="bold" style:font-weight-asian="bold" style:font-weight-complex="bold"/>
    </style:style>
    <style:style style:name="P135" style:parent-style-name="NormalWeb" style:family="paragraph"/>
    <style:style style:name="P136" style:parent-style-name="NormalWeb" style:family="paragraph"/>
    <style:style style:name="P137" style:parent-style-name="NormalWeb" style:family="paragraph"/>
    <style:style style:name="P138" style:parent-style-name="NormalWeb" style:family="paragraph"/>
    <style:style style:name="P139" style:parent-style-name="NormalWeb" style:family="paragraph"/>
    <style:style style:name="P140" style:parent-style-name="NormalWeb" style:family="paragraph"/>
    <style:style style:name="P141" style:parent-style-name="NormalWeb" style:family="paragraph"/>
    <style:style style:name="T142" style:parent-style-name="Élevé" style:family="text">
      <style:text-properties fo:font-weight="bold" style:font-weight-asian="bold" style:font-weight-complex="bold"/>
    </style:style>
    <style:style style:name="P143" style:parent-style-name="NormalWeb" style:family="paragraph"/>
    <style:style style:name="P144" style:parent-style-name="NormalWeb" style:family="paragraph"/>
    <style:style style:name="P145" style:parent-style-name="NormalWeb" style:family="paragraph"/>
    <style:style style:name="P146" style:parent-style-name="NormalWeb" style:family="paragraph"/>
    <style:style style:name="P147" style:parent-style-name="NormalWeb" style:family="paragraph"/>
    <style:style style:name="P148" style:parent-style-name="NormalWeb" style:family="paragraph"/>
    <style:style style:name="T149" style:parent-style-name="Élevé" style:family="text">
      <style:text-properties fo:font-weight="bold" style:font-weight-asian="bold" style:font-weight-complex="bold"/>
    </style:style>
    <style:style style:name="P150" style:parent-style-name="NormalWeb" style:family="paragraph"/>
    <style:style style:name="P151" style:parent-style-name="NormalWeb" style:family="paragraph"/>
    <style:style style:name="P152" style:parent-style-name="NormalWeb" style:family="paragraph"/>
    <style:style style:name="P153" style:parent-style-name="NormalWeb" style:family="paragraph"/>
    <style:style style:name="P154" style:parent-style-name="HorizontalLine" style:family="paragraph">
      <style:paragraph-properties fo:margin-bottom="0.0972in" fo:line-height="115%"/>
    </style:style>
    <style:style style:name="P155" style:parent-style-name="Titre2" style:family="paragraph">
      <style:paragraph-properties fo:margin-top="0in" fo:margin-bottom="0.0972in" fo:line-height="115%"/>
    </style:style>
    <style:style style:name="P156" style:parent-style-name="Textbody" style:family="paragraph"/>
    <style:style style:name="P157" style:parent-style-name="Textbody" style:family="paragraph"/>
    <style:style style:name="P158" style:parent-style-name="Textbody" style:family="paragraph"/>
    <style:style style:name="P159" style:parent-style-name="Textbody" style:family="paragraph"/>
    <style:style style:name="P160" style:parent-style-name="Textbody" style:family="paragraph"/>
    <style:style style:name="P161" style:parent-style-name="Textbody" style:family="paragraph"/>
    <style:style style:name="P162" style:parent-style-name="Textbody" style:family="paragraph"/>
    <style:style style:name="P163" style:parent-style-name="Textbody" style:family="paragraph"/>
    <style:style style:name="P164" style:parent-style-name="Textbody" style:family="paragraph"/>
    <style:style style:name="P165" style:parent-style-name="Textbody" style:family="paragraph"/>
    <style:style style:name="P166" style:parent-style-name="Textbody" style:family="paragraph"/>
    <style:style style:name="P167" style:parent-style-name="Textbody" style:family="paragraph"/>
    <style:style style:name="P168" style:parent-style-name="Textbody" style:family="paragraph"/>
    <style:style style:name="P169" style:parent-style-name="Textbody" style:family="paragraph"/>
    <style:style style:name="P170" style:parent-style-name="Textbody" style:family="paragraph"/>
    <style:style style:name="P171" style:parent-style-name="Textbody" style:family="paragraph"/>
    <style:style style:name="P172" style:parent-style-name="Textbody" style:family="paragraph"/>
    <style:style style:name="P173" style:parent-style-name="Textbody" style:family="paragraph"/>
    <style:style style:name="P174" style:parent-style-name="Textbody" style:family="paragraph"/>
    <style:style style:name="P175" style:parent-style-name="Textbody" style:family="paragraph"/>
    <style:style style:name="P176" style:parent-style-name="Textbody" style:family="paragraph"/>
    <style:style style:name="P177" style:parent-style-name="Textbody" style:family="paragraph"/>
    <style:style style:name="P178" style:parent-style-name="Textbody" style:family="paragraph"/>
    <style:style style:name="P179" style:parent-style-name="Textbody" style:family="paragraph"/>
    <style:style style:name="P180" style:parent-style-name="Textbody" style:family="paragraph"/>
    <style:style style:name="P181" style:parent-style-name="HorizontalLine" style:family="paragraph">
      <style:paragraph-properties fo:margin-bottom="0.0972in" fo:line-height="115%"/>
    </style:style>
    <style:style style:name="P182" style:parent-style-name="Titre2" style:family="paragraph">
      <style:paragraph-properties fo:margin-top="0in" fo:margin-bottom="0.0972in" fo:line-height="115%"/>
    </style:style>
    <style:style style:name="TableColumn184" style:family="table-column">
      <style:table-column-properties style:column-width="1.8006in" style:use-optimal-column-width="false"/>
    </style:style>
    <style:style style:name="TableColumn185" style:family="table-column">
      <style:table-column-properties style:column-width="4.8923in" style:use-optimal-column-width="false"/>
    </style:style>
    <style:style style:name="Table183" style:family="table">
      <style:table-properties style:width="6.693in" fo:margin-left="0in" table:align="lef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8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9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9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9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0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0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0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0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1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13" style:parent-style-name="HorizontalLine" style:family="paragraph">
      <style:paragraph-properties fo:margin-bottom="0.0972in" fo:line-height="115%"/>
    </style:style>
    <style:style style:name="P214" style:parent-style-name="Titre2" style:family="paragraph">
      <style:paragraph-properties fo:margin-top="0in" fo:margin-bottom="0.0972in" fo:line-height="115%"/>
    </style:style>
    <style:style style:name="P215" style:parent-style-name="Textbody" style:family="paragraph"/>
    <style:style style:name="P216" style:parent-style-name="Textbody" style:family="paragraph"/>
    <style:style style:name="P217" style:parent-style-name="Textbody" style:family="paragraph"/>
    <style:style style:name="P218" style:parent-style-name="Textbody" style:family="paragraph"/>
    <style:style style:name="P219" style:parent-style-name="Textbody" style:family="paragraph"/>
    <style:style style:name="P220" style:parent-style-name="Textbody" style:family="paragraph"/>
    <style:style style:name="P221" style:parent-style-name="HorizontalLine" style:family="paragraph">
      <style:paragraph-properties fo:margin-bottom="0.0972in" fo:line-height="115%"/>
    </style:style>
    <style:style style:name="P222" style:parent-style-name="Titre2" style:family="paragraph">
      <style:paragraph-properties fo:margin-top="0in" fo:margin-bottom="0.0972in" fo:line-height="115%"/>
    </style:style>
    <style:style style:name="P223" style:parent-style-name="Textbody" style:family="paragraph"/>
    <style:style style:name="P224" style:parent-style-name="Textbody" style:family="paragraph"/>
    <style:style style:name="P225" style:parent-style-name="Textbody" style:family="paragraph"/>
    <style:style style:name="P226" style:parent-style-name="Textbody" style:family="paragraph"/>
    <style:style style:name="P227" style:parent-style-name="Textbody" style:family="paragraph"/>
    <style:style style:name="P228" style:parent-style-name="Textbody" style:family="paragraph"/>
    <style:style style:name="P229" style:parent-style-name="Textbody" style:family="paragraph"/>
    <style:style style:name="P230" style:parent-style-name="Textbody" style:family="paragraph"/>
    <style:style style:name="P231" style:parent-style-name="Textbody" style:family="paragraph"/>
    <style:style style:name="P232" style:parent-style-name="Textbody" style:family="paragraph"/>
    <style:style style:name="P233" style:parent-style-name="Textbody" style:family="paragraph"/>
    <style:style style:name="P234" style:parent-style-name="Textbody" style:family="paragraph"/>
    <style:style style:name="P235" style:parent-style-name="HorizontalLine" style:family="paragraph">
      <style:paragraph-properties fo:margin-bottom="0.0972in" fo:line-height="115%"/>
    </style:style>
    <style:style style:name="P236" style:parent-style-name="Titre2" style:family="paragraph">
      <style:paragraph-properties fo:margin-top="0in" fo:margin-bottom="0.0972in" fo:line-height="115%"/>
    </style:style>
    <style:style style:name="P237" style:parent-style-name="Textbody" style:family="paragraph"/>
    <style:style style:name="P238" style:parent-style-name="Textbody" style:family="paragraph"/>
    <style:style style:name="P239" style:parent-style-name="Textbody" style:family="paragraph"/>
    <style:style style:name="P240" style:parent-style-name="Textbody" style:family="paragraph"/>
    <style:style style:name="P241" style:parent-style-name="Textbody" style:family="paragraph"/>
    <style:style style:name="P242" style:parent-style-name="HorizontalLine" style:family="paragraph">
      <style:paragraph-properties fo:margin-bottom="0.0972in" fo:line-height="115%"/>
    </style:style>
    <style:style style:name="P243" style:parent-style-name="Titre2" style:family="paragraph">
      <style:paragraph-properties fo:margin-top="0in" fo:margin-bottom="0.0972in" fo:line-height="115%"/>
    </style:style>
    <style:style style:name="TableColumn245" style:family="table-column">
      <style:table-column-properties style:column-width="1.8368in" style:use-optimal-column-width="false"/>
    </style:style>
    <style:style style:name="TableColumn246" style:family="table-column">
      <style:table-column-properties style:column-width="2.5409in" style:use-optimal-column-width="false"/>
    </style:style>
    <style:style style:name="TableColumn247" style:family="table-column">
      <style:table-column-properties style:column-width="1.1083in" style:use-optimal-column-width="false"/>
    </style:style>
    <style:style style:name="Table244" style:family="table">
      <style:table-properties style:width="5.4861in" fo:margin-left="0in" table:align="left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5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5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5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5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5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5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6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6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6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6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7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7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7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7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76" style:parent-style-name="HorizontalLine" style:family="paragraph">
      <style:paragraph-properties fo:margin-bottom="0.0972in" fo:line-height="115%"/>
    </style:style>
    <style:style style:name="P277" style:parent-style-name="Titre2" style:family="paragraph">
      <style:paragraph-properties fo:margin-top="0in" fo:margin-bottom="0.0972in" fo:line-height="115%"/>
    </style:style>
    <style:style style:name="P278" style:parent-style-name="Textbody" style:family="paragraph"/>
    <style:style style:name="P279" style:parent-style-name="Textbody" style:family="paragraph"/>
    <style:style style:name="P280" style:parent-style-name="Textbody" style:family="paragraph"/>
    <style:style style:name="P281" style:parent-style-name="Textbody" style:family="paragraph"/>
    <style:style style:name="P282" style:parent-style-name="Textbody" style:family="paragraph"/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h text:style-name="P1" text:outline-level="1">Cahier des charges — Refonte du site<text:s/><text:span text:style-name="StrongEmphasis">Decramp</text:span></text:h>
      <text:h text:style-name="P2" text:outline-level="2">1. Présentation du projet</text:h>
      <text:p text:style-name="Textbody"><text:span text:style-name="StrongEmphasis">Nom du projet :</text:span><text:s/>Refonte et modernisation du site web<text:s/><text:span text:style-name="Accentuation">Decramp</text:span><text:line-break/><text:span text:style-name="StrongEmphasis">Client / Entreprise :</text:span><text:s/>Société Decramp (installations et maintenance électriques)<text:line-break/><text:span text:style-name="StrongEmphasis">Réalisé par :</text:span><text:s/>Boukhalfa Camil<text:line-break/><text:span text:style-name="StrongEmphasis">Objectif principal :</text:span><text:s/>Actualiser le site web existant pour le rendre conforme aux standards actuels<text:s/>(design, accessibilité, compatibilité mobile, sécurité, interactivité et ergonomie).</text:p>
      <text:p text:style-name="P3"/>
      <text:h text:style-name="P4" text:outline-level="2">2. Contexte du projet</text:h>
      <text:p text:style-name="Textbody">Le site actuel (<text:a xlink:href="https://www.decramp.fr/" office:target-frame-name="_top" xlink:show="replace"><text:span text:style-name="Accentuation">https://www.decramp.fr/</text:span></text:a>) présente l’entreprise et ses services, mais il n’est plus à jour ni conforme aux attentes actuelles du web moderne.<text:line-break/>Cette refonte a pour but de :</text:p>
      <text:list text:style-name="LFO1" text:continue-numbering="true">
        <text:list-item>
          <text:p text:style-name="P5">Moderniser l’image de la société.</text:p>
        </text:list-item>
        <text:list-item>
          <text:p text:style-name="P6">Rendre la navigation intuitive et agréable sur tous les appareils.</text:p>
        </text:list-item>
        <text:list-item>
          <text:p text:style-name="P7">Ajouter des fonctionnalités interactives (formulaire de contact, dépôt de commentaires, demande de devis, etc.).</text:p>
        </text:list-item>
        <text:list-item>
          <text:p text:style-name="P8">Optimiser les performances et la sécurité.</text:p>
        </text:list-item>
        <text:list-item>
          <text:p text:style-name="P9">Respecter les normes RGPD et d’accessibilité.</text:p>
        </text:list-item>
      </text:list>
      <text:p text:style-name="P10"/>
      <text:h text:style-name="P11" text:outline-level="2">3. Objectifs</text:h>
      <text:h text:style-name="P12" text:outline-level="3">Objectifs principaux</text:h>
      <text:list text:style-name="LFO2" text:continue-numbering="true">
        <text:list-item>
          <text:p text:style-name="P13">Donner une image moderne, claire et professionnelle de la société.</text:p>
        </text:list-item>
        <text:list-item>
          <text:p text:style-name="P14">Faciliter la mise en relation entre clients et entreprise.</text:p>
        </text:list-item>
        <text:list-item>
          <text:p text:style-name="P15">Présenter clairement les services pour<text:s/><text:span text:style-name="StrongEmphasis">particuliers</text:span><text:s/>et<text:s/><text:span text:style-name="StrongEmphasis">professionnels</text:span>.</text:p>
        </text:list-item>
        <text:list-item>
          <text:p text:style-name="P16">Permettre aux visiteurs de laisser un<text:s/><text:span text:style-name="StrongEmphasis">avis/commentaire</text:span>.</text:p>
        </text:list-item>
        <text:list-item>
          <text:p text:style-name="P17">Mettre le site aux<text:s/><text:span text:style-name="StrongEmphasis">normes HTML5 / CSS3 / PHP 8 / RGPD / responsive design</text:span>.</text:p>
        </text:list-item>
      </text:list>
      <text:h text:style-name="P18" text:outline-level="3">Objectifs secondaires</text:h>
      <text:list text:style-name="LFO3" text:continue-numbering="true">
        <text:list-item>
          <text:p text:style-name="P19">Améliorer le référencement naturel (SEO).</text:p>
        </text:list-item>
        <text:list-item>
          <text:p text:style-name="P20">Ajouter des animations discrètes pour renforcer la modernité du site.</text:p>
        </text:list-item>
        <text:list-item>
          <text:p text:style-name="P21">Intégrer une zone d’administration simple pour consulter les messages/commentaires.</text:p>
        </text:list-item>
      </text:list>
      <text:p text:style-name="P22"/>
      <text:soft-page-break/>
      <text:h text:style-name="P23" text:outline-level="2">4. Public cible</text:h>
      <text:p text:style-name="P24"><text:span text:style-name="StrongEmphasis">_</text:span><text:span text:style-name="StrongEmphasis">Particuliers</text:span><text:s/>: souhaitant des services d’installation, dépannage ou rénovation électrique.</text:p>
      <text:p text:style-name="P25"><text:span text:style-name="StrongEmphasis">_</text:span><text:span text:style-name="StrongEmphasis">Professionnels</text:span><text:s/>: entreprises, commerces, collectivités cherchant un partenaire fiable pour leurs installations électriques.</text:p>
      <text:p text:style-name="P26"><text:span text:style-name="StrongEmphasis">_</text:span><text:span text:style-name="StrongEmphasis">Partenaires techniques</text:span><text:s/>: fournisseurs ou sous-traitants potentiels.</text:p>
      <text:h text:style-name="Titre2" text:outline-level="2"><text:span text:style-name="T27">5. Benchmark concurrentiel</text:span></text:h>
      <text:h text:style-name="Titre3" text:outline-level="3"><text:span text:style-name="T28">Objectifs :</text:span></text:h>
      <text:list text:style-name="LFO10" text:continue-numbering="true">
        <text:list-item>
          <text:p text:style-name="P29">Comprendre les standards de présentation d’un site d’électricien / artisan.</text:p>
        </text:list-item>
        <text:list-item>
          <text:p text:style-name="P30">Identifier les fonctionnalités attendues par les utilisateurs.</text:p>
        </text:list-item>
        <text:list-item>
          <text:p text:style-name="P31">Déceler les opportunités d'amélioration.</text:p>
        </text:list-item>
      </text:list>
      <text:h text:style-name="Titre3" text:outline-level="3"><text:span text:style-name="T32">Éléments analysés :</text:span></text:h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  <table:table-column table:style-name="TableColumn37"/>
        </table:table-columns>
        <table:table-header-rows>
          <table:table-row table:style-name="TableRow38">
            <table:table-cell table:style-name="TableCell39">
              <text:p text:style-name="P40">Critère</text:p>
            </table:table-cell>
            <table:table-cell table:style-name="TableCell41">
              <text:p text:style-name="P42">Concurrent 1</text:p>
            </table:table-cell>
            <table:table-cell table:style-name="TableCell43">
              <text:p text:style-name="P44">Concurrent 2</text:p>
            </table:table-cell>
            <table:table-cell table:style-name="TableCell45">
              <text:p text:style-name="P46">Concurrent 3</text:p>
            </table:table-cell>
          </table:table-row>
        </table:table-header-rows>
        <table:table-row table:style-name="TableRow47">
          <table:table-cell table:style-name="TableCell48">
            <text:p text:style-name="Normal">Design &amp; ergonomie</text:p>
          </table:table-cell>
          <table:table-cell table:style-name="TableCell49">
            <text:p text:style-name="Normal">Moderne / dépassé</text:p>
          </table:table-cell>
          <table:table-cell table:style-name="TableCell50">
            <text:p text:style-name="Normal">Moderne</text:p>
          </table:table-cell>
          <table:table-cell table:style-name="TableCell51">
            <text:p text:style-name="Normal">Basique</text:p>
          </table:table-cell>
        </table:table-row>
        <table:table-row table:style-name="TableRow52">
          <table:table-cell table:style-name="TableCell53">
            <text:p text:style-name="Normal">Navigation</text:p>
          </table:table-cell>
          <table:table-cell table:style-name="TableCell54">
            <text:p text:style-name="Normal">Simple</text:p>
          </table:table-cell>
          <table:table-cell table:style-name="TableCell55">
            <text:p text:style-name="Normal">Complexe</text:p>
          </table:table-cell>
          <table:table-cell table:style-name="TableCell56">
            <text:p text:style-name="Normal">Bonne</text:p>
          </table:table-cell>
        </table:table-row>
        <table:table-row table:style-name="TableRow57">
          <table:table-cell table:style-name="TableCell58">
            <text:p text:style-name="Normal">Section services</text:p>
          </table:table-cell>
          <table:table-cell table:style-name="TableCell59">
            <text:p text:style-name="Normal">Oui</text:p>
          </table:table-cell>
          <table:table-cell table:style-name="TableCell60">
            <text:p text:style-name="Normal">Oui</text:p>
          </table:table-cell>
          <table:table-cell table:style-name="TableCell61">
            <text:p text:style-name="Normal">Incomplète</text:p>
          </table:table-cell>
        </table:table-row>
        <table:table-row table:style-name="TableRow62">
          <table:table-cell table:style-name="TableCell63">
            <text:p text:style-name="Normal">Formulaire de contact</text:p>
          </table:table-cell>
          <table:table-cell table:style-name="TableCell64">
            <text:p text:style-name="Normal">Oui</text:p>
          </table:table-cell>
          <table:table-cell table:style-name="TableCell65">
            <text:p text:style-name="Normal">Non</text:p>
          </table:table-cell>
          <table:table-cell table:style-name="TableCell66">
            <text:p text:style-name="Normal">Oui</text:p>
          </table:table-cell>
        </table:table-row>
        <table:table-row table:style-name="TableRow67">
          <table:table-cell table:style-name="TableCell68">
            <text:p text:style-name="Normal">Avis / témoignages</text:p>
          </table:table-cell>
          <table:table-cell table:style-name="TableCell69">
            <text:p text:style-name="Normal">Oui</text:p>
          </table:table-cell>
          <table:table-cell table:style-name="TableCell70">
            <text:p text:style-name="Normal">Oui</text:p>
          </table:table-cell>
          <table:table-cell table:style-name="TableCell71">
            <text:p text:style-name="Normal">Non</text:p>
          </table:table-cell>
        </table:table-row>
        <table:table-row table:style-name="TableRow72">
          <table:table-cell table:style-name="TableCell73">
            <text:p text:style-name="Normal">Page connexion / compte client</text:p>
          </table:table-cell>
          <table:table-cell table:style-name="TableCell74">
            <text:p text:style-name="Normal">Rare</text:p>
          </table:table-cell>
          <table:table-cell table:style-name="TableCell75">
            <text:p text:style-name="Normal">Non</text:p>
          </table:table-cell>
          <table:table-cell table:style-name="TableCell76">
            <text:p text:style-name="Normal">Rare</text:p>
          </table:table-cell>
        </table:table-row>
        <table:table-row table:style-name="TableRow77">
          <table:table-cell table:style-name="TableCell78">
            <text:p text:style-name="Normal">Temps de chargement</text:p>
          </table:table-cell>
          <table:table-cell table:style-name="TableCell79">
            <text:p text:style-name="Normal">Moyen</text:p>
          </table:table-cell>
          <table:table-cell table:style-name="TableCell80">
            <text:p text:style-name="Normal">Rapide</text:p>
          </table:table-cell>
          <table:table-cell table:style-name="TableCell81">
            <text:p text:style-name="Normal">Lent</text:p>
          </table:table-cell>
        </table:table-row>
      </table:table>
      <text:h text:style-name="Titre3" text:outline-level="3"><text:span text:style-name="T82">Résumé du benchmark :</text:span></text:h>
      <text:p text:style-name="NormalWeb">La majorité des sites concurrents proposent :</text:p>
      <text:list text:style-name="LFO11" text:continue-numbering="true">
        <text:list-item>
          <text:p text:style-name="P83">Une page d’accueil avec une présentation rapide ;</text:p>
        </text:list-item>
        <text:list-item>
          <text:p text:style-name="P84">Une section services structurée ;</text:p>
        </text:list-item>
        <text:list-item>
          <text:p text:style-name="P85">Un formulaire de contact simple, sans sécurité avancée ;</text:p>
        </text:list-item>
        <text:list-item>
          <text:p text:style-name="P86">Très peu d’interactions dynamiques (peu de JS) ;</text:p>
        </text:list-item>
        <text:list-item>
          <text:p text:style-name="P87">Très peu proposent<text:s/><text:span text:style-name="Élevé">une zone membre ou un espace admin</text:span>, ce qui te donne un avantage.</text:p>
        </text:list-item>
      </text:list>
      <text:p text:style-name="NormalWeb">Ton projet se démarque par :</text:p>
      <text:list text:style-name="LFO12" text:continue-numbering="true">
        <text:list-item>
          <text:p text:style-name="P88">Une partie<text:s/><text:span text:style-name="Élevé">connexion / admin</text:span><text:s/>très complète,</text:p>
        </text:list-item>
        <text:list-item>
          <text:p text:style-name="P89">Un système de commentaires modérés,</text:p>
        </text:list-item>
        <text:list-item>
          <text:p text:style-name="P90">Un carousel moderne en jQuery,</text:p>
        </text:list-item>
        <text:list-item>
          <text:p text:style-name="P91">Un design plus professionnel et cohérent.</text:p>
        </text:list-item>
      </text:list>
      <text:p text:style-name="Normal"><draw:custom-shape svg:x="0in" svg:y="0in" svg:width="45.51042in" svg:height="0.00139in" draw:z-index="0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p>
      <text:h text:style-name="Titre2" text:outline-level="2"><text:span text:style-name="T92">6. Analyse SWOT</text:span></text:h>
      <text:p text:style-name="NormalWeb">Analyse stratégique du projet.</text:p>
      <text:soft-page-break/>
      <text:h text:style-name="Titre3" text:outline-level="3"><text:span text:style-name="T93">Forces</text:span></text:h>
      <text:list text:style-name="LFO13" text:continue-numbering="true">
        <text:list-item>
          <text:p text:style-name="P94">Site sécurisé (reCAPTCHA, validation serveur, mots de passe hashés).</text:p>
        </text:list-item>
        <text:list-item>
          <text:p text:style-name="P95">Architecture claire et évolutive (PDO, MVC ou organisation modulaire).</text:p>
        </text:list-item>
        <text:list-item>
          <text:p text:style-name="P96">Pages professionnelles (Contact, Services, Partenaires…).</text:p>
        </text:list-item>
        <text:list-item>
          <text:p text:style-name="P97">Espace utilisateur + espace admin.</text:p>
        </text:list-item>
        <text:list-item>
          <text:p text:style-name="P98">Modération automatique des commentaires.</text:p>
        </text:list-item>
        <text:list-item>
          <text:p text:style-name="P99">Bon référencement naturel (SEO optimisé).</text:p>
        </text:list-item>
      </text:list>
      <text:h text:style-name="Titre3" text:outline-level="3"><text:span text:style-name="T100">Faiblesses</text:span></text:h>
      <text:list text:style-name="LFO14" text:continue-numbering="true">
        <text:list-item>
          <text:p text:style-name="P101">Temps de développement plus long.</text:p>
        </text:list-item>
        <text:list-item>
          <text:p text:style-name="P102">Dépendance à PHP/PDO et validations manuelles.</text:p>
        </text:list-item>
        <text:list-item>
          <text:p text:style-name="P103">Pas encore de tableau de bord avancé pour l’admin.</text:p>
        </text:list-item>
      </text:list>
      <text:h text:style-name="Titre3" text:outline-level="3"><text:span text:style-name="T104">Opportunités</text:span></text:h>
      <text:list text:style-name="LFO15" text:continue-numbering="true">
        <text:list-item>
          <text:p text:style-name="P105">Ajouter un système de devis automatisé (déjà amorcé).</text:p>
        </text:list-item>
        <text:list-item>
          <text:p text:style-name="P106">Développer la prise de rendez-vous en ligne.</text:p>
        </text:list-item>
        <text:list-item>
          <text:p text:style-name="P107">Créer une application mobile dérivée du site.</text:p>
        </text:list-item>
        <text:list-item>
          <text:p text:style-name="P108">Augmenter la confiance client grâce aux avis vérifiés.</text:p>
        </text:list-item>
      </text:list>
      <text:h text:style-name="Titre3" text:outline-level="3"><text:span text:style-name="T109">Menaces</text:span></text:h>
      <text:list text:style-name="LFO16" text:continue-numbering="true">
        <text:list-item>
          <text:p text:style-name="P110">Concurrence forte d’autres électriciens locaux.</text:p>
        </text:list-item>
        <text:list-item>
          <text:p text:style-name="P111">Risques de SPAM sans reCAPTCHA (déjà corrigé).</text:p>
        </text:list-item>
        <text:list-item>
          <text:p text:style-name="P112">Attaques potentielles (SQL injections — déjà gérées).</text:p>
        </text:list-item>
      </text:list>
      <text:p text:style-name="Normal"><draw:custom-shape svg:x="0in" svg:y="0in" svg:width="45.51042in" svg:height="0.00139in" draw:z-index="0" draw:id="id1" draw:style-name="a1" draw:name="Horizontal Line 2" text:anchor-type="as-char"><svg:title/><svg:desc/><draw:enhanced-geometry draw:type="non-primitive" svg:viewBox="0 0 21600 21600" draw:enhanced-path="M 0 0 L 21600 0 21600 21600 0 21600 Z N"/></draw:custom-shape></text:p>
      <text:h text:style-name="Titre2" text:outline-level="2"><text:span text:style-name="T113">7. Persona (utilisateur type)</text:span></text:h>
      <text:p text:style-name="NormalWeb">Un persona correspond au profil représentatif d’un utilisateur cible de ton site.</text:p>
      <text:h text:style-name="Titre3" text:outline-level="3"><text:span text:style-name="T114">Persona 1 — Client particulier</text:span></text:h>
      <text:p text:style-name="NormalWeb"><text:span text:style-name="Élevé">Nom :</text:span><text:s/>Sophie, 41 ans<text:line-break/><text:span text:style-name="Élevé">Situation :</text:span><text:s/>Propriétaire d’une maison<text:line-break/><text:span text:style-name="Élevé">Objectifs :</text:span></text:p>
      <text:list text:style-name="LFO17" text:continue-numbering="true">
        <text:list-item>
          <text:p text:style-name="P115">Trouver rapidement un électricien fiable</text:p>
        </text:list-item>
        <text:list-item>
          <text:p text:style-name="P116">Obtenir un devis sans déplacement</text:p>
        </text:list-item>
        <text:list-item>
          <text:p text:style-name="P117">Lire les avis clients<text:line-break/><text:span text:style-name="Élevé">Freins :</text:span></text:p>
        </text:list-item>
        <text:list-item>
          <text:p text:style-name="P118">Méfiance envers les artisans inconnus</text:p>
        </text:list-item>
        <text:list-item>
          <text:p text:style-name="P119">Peur du coût final<text:line-break/><text:span text:style-name="Élevé">Attentes :</text:span></text:p>
        </text:list-item>
        <text:list-item>
          <text:p text:style-name="P120">Un site clair, simple, rapide</text:p>
        </text:list-item>
        <text:list-item>
          <text:p text:style-name="P121">Un formulaire de contact rassurant</text:p>
        </text:list-item>
        <text:list-item>
          <text:p text:style-name="P122">Présentation détaillée des services</text:p>
        </text:list-item>
      </text:list>
      <text:soft-page-break/>
      <text:h text:style-name="Titre3" text:outline-level="3"><text:span text:style-name="T123">Persona 2 — Client professionnel</text:span></text:h>
      <text:p text:style-name="NormalWeb"><text:span text:style-name="Élevé">Nom :</text:span><text:s/>Michel, 52 ans<text:line-break/><text:span text:style-name="Élevé">Métier :</text:span><text:s/>Gérant d'une petite entreprise<text:line-break/><text:span text:style-name="Élevé">Objectifs :</text:span></text:p>
      <text:list text:style-name="LFO18" text:continue-numbering="true">
        <text:list-item>
          <text:p text:style-name="P124">Demander un devis pour un local</text:p>
        </text:list-item>
        <text:list-item>
          <text:p text:style-name="P125">Avoir un artisan disponible rapidement<text:line-break/><text:span text:style-name="Élevé">Freins :</text:span></text:p>
        </text:list-item>
        <text:list-item>
          <text:p text:style-name="P126">Processus lent ou formulaire difficile<text:line-break/><text:span text:style-name="Élevé">Attentes :</text:span></text:p>
        </text:list-item>
        <text:list-item>
          <text:p text:style-name="P127">Formulaire dédié entreprises</text:p>
        </text:list-item>
        <text:list-item>
          <text:p text:style-name="P128">Prise en charge rapide et efficace</text:p>
        </text:list-item>
      </text:list>
      <text:h text:style-name="Titre3" text:outline-level="3"><text:span text:style-name="T129">Persona 3 — Administrateur du site</text:span></text:h>
      <text:p text:style-name="NormalWeb"><text:span text:style-name="Élevé">Nom :</text:span><text:s/>Thierry<text:line-break/><text:span text:style-name="Élevé">Objectif :</text:span></text:p>
      <text:list text:style-name="LFO19" text:continue-numbering="true">
        <text:list-item>
          <text:p text:style-name="P130">Lire les messages reçus</text:p>
        </text:list-item>
        <text:list-item>
          <text:p text:style-name="P131">Gérer les commentaires (modération)</text:p>
        </text:list-item>
        <text:list-item>
          <text:p text:style-name="P132">Mettre à jour les services</text:p>
        </text:list-item>
      </text:list>
      <text:p text:style-name="Normal"><draw:custom-shape svg:x="0in" svg:y="0in" svg:width="45.51042in" svg:height="0.00139in" draw:z-index="0" draw:id="id2" draw:style-name="a2" draw:name="Horizontal Line 3" text:anchor-type="as-char"><svg:title/><svg:desc/><draw:enhanced-geometry draw:type="non-primitive" svg:viewBox="0 0 21600 21600" draw:enhanced-path="M 0 0 L 21600 0 21600 21600 0 21600 Z N"/></draw:custom-shape></text:p>
      <text:h text:style-name="Titre2" text:outline-level="2"><text:span text:style-name="T133">8. Parcours utilisateur (User Journey)</text:span></text:h>
      <text:h text:style-name="Titre3" text:outline-level="3"><text:span text:style-name="T134">Exemple : visiteur → client</text:span></text:h>
      <text:list text:style-name="LFO20" text:continue-numbering="true">
        <text:list-item>
          <text:p text:style-name="P135">Arrive sur la page d’accueil</text:p>
        </text:list-item>
        <text:list-item>
          <text:p text:style-name="P136">Consulte les services</text:p>
        </text:list-item>
        <text:list-item>
          <text:p text:style-name="P137">Vérifie les avis/commentaires</text:p>
        </text:list-item>
        <text:list-item>
          <text:p text:style-name="P138">Remplit le formulaire de contact</text:p>
        </text:list-item>
        <text:list-item>
          <text:p text:style-name="P139">Reçoit un mail de confirmation</text:p>
        </text:list-item>
        <text:list-item>
          <text:p text:style-name="P140">L’admin reçoit la demande dans la base + email</text:p>
        </text:list-item>
        <text:list-item>
          <text:p text:style-name="P141">L’utilisateur devient client</text:p>
        </text:list-item>
      </text:list>
      <text:h text:style-name="Titre3" text:outline-level="3"><text:span text:style-name="T142">Utilisateur inscrit</text:span></text:h>
      <text:list text:style-name="LFO21" text:continue-numbering="true">
        <text:list-item>
          <text:p text:style-name="P143">Visite la page d’accueil</text:p>
        </text:list-item>
        <text:list-item>
          <text:p text:style-name="P144">Clique sur<text:s/><text:span text:style-name="Accentuation">Connexion</text:span></text:p>
        </text:list-item>
        <text:list-item>
          <text:p text:style-name="P145">Rentre ses identifiants (hash + vérification PDO)</text:p>
        </text:list-item>
        <text:list-item>
          <text:p text:style-name="P146">Accède à son espace personnel</text:p>
        </text:list-item>
        <text:list-item>
          <text:p text:style-name="P147">Modifie ses informations / dépose un commentaire</text:p>
        </text:list-item>
        <text:list-item>
          <text:p text:style-name="P148">Reçoit un accusé</text:p>
        </text:list-item>
      </text:list>
      <text:h text:style-name="Titre3" text:outline-level="3"><text:span text:style-name="T149">Administrateur</text:span></text:h>
      <text:list text:style-name="LFO22" text:continue-numbering="true">
        <text:list-item>
          <text:p text:style-name="P150">Se connecte avec rôle admin</text:p>
        </text:list-item>
        <text:list-item>
          <text:p text:style-name="P151">Accède à une interface privée</text:p>
        </text:list-item>
        <text:list-item>
          <text:p text:style-name="P152">Peut consulter les formulaires, commentaires, utilisateurs</text:p>
        </text:list-item>
        <text:list-item>
          <text:p text:style-name="P153">Peut modérer / valider / supprimer</text:p>
        </text:list-item>
      </text:list>
      <text:p text:style-name="Textbody"/>
      <text:p text:style-name="P154"/>
      <text:h text:style-name="P155" text:outline-level="2">9. Arborescence du site</text:h>
      <text:list text:style-name="LFO5" text:continue-numbering="true">
        <text:list-item>
          <text:p text:style-name="P156"><text:span text:style-name="StrongEmphasis">Accueil</text:span></text:p>
          <text:list text:continue-numbering="true">
            <text:list-item>
              <text:p text:style-name="P157">Présentation rapide</text:p>
            </text:list-item>
            <text:list-item>
              <text:p text:style-name="P158">Section d’accroche</text:p>
            </text:list-item>
            <text:list-item>
              <text:p text:style-name="P159">Boutons d’accès aux sections “Particuliers” et “Professionnels”</text:p>
            </text:list-item>
            <text:list-item>
              <text:p text:style-name="P160">Animation d’arrière-plan (étoiles, effet lumineux)</text:p>
            </text:list-item>
          </text:list>
        </text:list-item>
        <text:list-item>
          <text:p text:style-name="P161"><text:span text:style-name="StrongEmphasis">Particuliers</text:span></text:p>
          <text:list text:continue-numbering="true">
            <text:list-item>
              <text:p text:style-name="P162">Description des services proposés</text:p>
            </text:list-item>
            <text:list-item>
              <text:p text:style-name="P163">Galerie d’images</text:p>
            </text:list-item>
            <text:list-item>
              <text:p text:style-name="P164">Lien vers formulaire de contact</text:p>
            </text:list-item>
          </text:list>
        </text:list-item>
        <text:list-item>
          <text:p text:style-name="P165"><text:span text:style-name="StrongEmphasis">Professionnels</text:span></text:p>
          <text:list text:continue-numbering="true">
            <text:list-item>
              <text:p text:style-name="P166">Description des services spécialisés</text:p>
            </text:list-item>
            <text:list-item>
              <text:p text:style-name="P167">Galerie d’images</text:p>
            </text:list-item>
            <text:list-item>
              <text:p text:style-name="P168">Lien vers formulaire de contact</text:p>
            </text:list-item>
          </text:list>
        </text:list-item>
        <text:list-item>
          <text:p text:style-name="P169"><text:span text:style-name="StrongEmphasis">Liens utiles</text:span></text:p>
          <text:list text:continue-numbering="true">
            <text:list-item>
              <text:p text:style-name="P170">Ressources partenaires et réglementaires (liens vers organismes officiels)</text:p>
            </text:list-item>
          </text:list>
        </text:list-item>
        <text:list-item>
          <text:p text:style-name="P171"><text:span text:style-name="StrongEmphasis">Commentaires / Avis</text:span></text:p>
          <text:list text:continue-numbering="true">
            <text:list-item>
              <text:p text:style-name="P172">Système d’avis (pseudo, note par étoiles, commentaire)</text:p>
            </text:list-item>
            <text:list-item>
              <text:p text:style-name="P173">Stockage en base de données via PHP/MySQL</text:p>
            </text:list-item>
            <text:list-item>
              <text:p text:style-name="P174">Modération simple (admin ou validation automatique)</text:p>
            </text:list-item>
          </text:list>
        </text:list-item>
        <text:list-item>
          <text:p text:style-name="P175"><text:span text:style-name="StrongEmphasis">Contact</text:span></text:p>
          <text:list text:continue-numbering="true">
            <text:list-item>
              <text:p text:style-name="P176">Formulaire (nom, prénom, e-mail, sujet, message)</text:p>
            </text:list-item>
            <text:list-item>
              <text:p text:style-name="P177">Envoi via PHP</text:p>
            </text:list-item>
            <text:list-item>
              <text:p text:style-name="P178">Affichage d’une carte (Google Maps ou équivalent)</text:p>
            </text:list-item>
          </text:list>
        </text:list-item>
        <text:list-item>
          <text:p text:style-name="P179"><text:span text:style-name="StrongEmphasis">Mentions légales / RGPD</text:span></text:p>
          <text:list text:continue-numbering="true">
            <text:list-item>
              <text:p text:style-name="P180">Informations sur le traitement des données et les droits utilisateurs.</text:p>
            </text:list-item>
          </text:list>
        </text:list-item>
      </text:list>
      <text:p text:style-name="P181"/>
      <text:soft-page-break/>
      <text:h text:style-name="P182" text:outline-level="2">10. Fonctionnalités techniques</text:h>
      <table:table table:style-name="Table183">
        <table:table-columns>
          <table:table-column table:style-name="TableColumn184"/>
          <table:table-column table:style-name="TableColumn185"/>
        </table:table-columns>
        <table:table-header-rows>
          <table:table-row table:style-name="TableRow186">
            <table:table-cell table:style-name="TableCell187">
              <text:p text:style-name="TableHeading">Fonctionnalité</text:p>
            </table:table-cell>
            <table:table-cell table:style-name="TableCell188">
              <text:p text:style-name="TableHeading">Description</text:p>
            </table:table-cell>
          </table:table-row>
        </table:table-header-rows>
        <table:table-row table:style-name="TableRow189">
          <table:table-cell table:style-name="TableCell190">
            <text:p text:style-name="TableContents"><text:span text:style-name="StrongEmphasis">Menu burger responsive</text:span></text:p>
          </table:table-cell>
          <table:table-cell table:style-name="TableCell191">
            <text:p text:style-name="TableContents">Navigation optimisée pour mobile avec animation “croix”.</text:p>
          </table:table-cell>
        </table:table-row>
        <table:table-row table:style-name="TableRow192">
          <table:table-cell table:style-name="TableCell193">
            <text:p text:style-name="TableContents"><text:span text:style-name="StrongEmphasis">Animation Hero / étoiles</text:span></text:p>
          </table:table-cell>
          <table:table-cell table:style-name="TableCell194">
            <text:p text:style-name="TableContents">Effet visuel animé en JavaScript pour dynamiser la page d’accueil.</text:p>
          </table:table-cell>
        </table:table-row>
        <table:table-row table:style-name="TableRow195">
          <table:table-cell table:style-name="TableCell196">
            <text:p text:style-name="TableContents"><text:span text:style-name="StrongEmphasis">Formulaire de contact</text:span></text:p>
          </table:table-cell>
          <table:table-cell table:style-name="TableCell197">
            <text:p text:style-name="TableContents">Envoi<text:s/>d’e-mails via PHP (sécurisé, avec validation et messages d’erreur).</text:p>
          </table:table-cell>
        </table:table-row>
        <table:table-row table:style-name="TableRow198">
          <table:table-cell table:style-name="TableCell199">
            <text:p text:style-name="TableContents"><text:span text:style-name="StrongEmphasis">Section Commentaires</text:span></text:p>
          </table:table-cell>
          <table:table-cell table:style-name="TableCell200">
            <text:p text:style-name="TableContents">Enregistrement et affichage des avis utilisateurs avec notation en étoiles.</text:p>
          </table:table-cell>
        </table:table-row>
        <table:table-row table:style-name="TableRow201">
          <table:table-cell table:style-name="TableCell202">
            <text:p text:style-name="TableContents"><text:span text:style-name="StrongEmphasis">Galeries d’images</text:span></text:p>
          </table:table-cell>
          <table:table-cell table:style-name="TableCell203">
            <text:p text:style-name="TableContents">Uniformisation des images avec taille et effet d’ombre.</text:p>
          </table:table-cell>
        </table:table-row>
        <table:table-row table:style-name="TableRow204">
          <table:table-cell table:style-name="TableCell205">
            <text:p text:style-name="TableContents"><text:span text:style-name="StrongEmphasis">Responsive<text:s/></text:span><text:span text:style-name="StrongEmphasis">Design</text:span></text:p>
          </table:table-cell>
          <table:table-cell table:style-name="TableCell206">
            <text:p text:style-name="TableContents">Adaptation à tous les écrans (mobile, tablette, ordinateur).</text:p>
          </table:table-cell>
        </table:table-row>
        <table:table-row table:style-name="TableRow207">
          <table:table-cell table:style-name="TableCell208">
            <text:p text:style-name="TableContents"><text:span text:style-name="StrongEmphasis">Sécurité PHP</text:span></text:p>
          </table:table-cell>
          <table:table-cell table:style-name="TableCell209">
            <text:p text:style-name="TableContents">Validation et nettoyage des entrées (prévention XSS et injection SQL).</text:p>
          </table:table-cell>
        </table:table-row>
        <table:table-row table:style-name="TableRow210">
          <table:table-cell table:style-name="TableCell211">
            <text:p text:style-name="TableContents"><text:span text:style-name="StrongEmphasis">Accessibilité</text:span></text:p>
          </table:table-cell>
          <table:table-cell table:style-name="TableCell212">
            <text:p text:style-name="TableContents">Contraste suffisant, balises alt, structure HTML sémantique.</text:p>
          </table:table-cell>
        </table:table-row>
      </table:table>
      <text:p text:style-name="P213"/>
      <text:h text:style-name="P214" text:outline-level="2">11. Technologies utilisées</text:h>
      <text:list text:style-name="LFO6" text:continue-numbering="true">
        <text:list-item>
          <text:p text:style-name="P215"><text:span text:style-name="StrongEmphasis">Front-end :</text:span><text:s/>HTML5, CSS3, JavaScript (vanilla)</text:p>
        </text:list-item>
        <text:list-item>
          <text:p text:style-name="P216"><text:span text:style-name="StrongEmphasis">Back-end :</text:span><text:s/>PHP 8</text:p>
        </text:list-item>
        <text:list-item>
          <text:p text:style-name="P217"><text:span text:style-name="StrongEmphasis">Base de données :</text:span><text:s/>MySQL</text:p>
        </text:list-item>
        <text:list-item>
          <text:p text:style-name="P218"><text:span text:style-name="StrongEmphasis">Outils :</text:span><text:s/>VS Code, Figma, GitHub, XAMPP/WAMP</text:p>
        </text:list-item>
        <text:list-item>
          <text:p text:style-name="P219"><text:span text:style-name="StrongEmphasis">Versionning :</text:span><text:s/>Git</text:p>
        </text:list-item>
        <text:list-item>
          <text:p text:style-name="P220"><text:span text:style-name="StrongEmphasis">Hébergement :</text:span><text:s/>Serveur PHP/MySQL</text:p>
        </text:list-item>
      </text:list>
      <text:p text:style-name="P221"/>
      <text:h text:style-name="P222" text:outline-level="2">12. Charte graphique (base)</text:h>
      <text:list text:style-name="LFO7" text:continue-numbering="true">
        <text:list-item>
          <text:p text:style-name="P223"><text:span text:style-name="StrongEmphasis">Couleurs principales :</text:span></text:p>
          <text:list text:continue-numbering="true">
            <text:list-item>
              <text:p text:style-name="P224">Bleu électrique<text:s/>(#004080) → Confiance et professionnalisme</text:p>
            </text:list-item>
            <text:list-item>
              <text:p text:style-name="P225">Jaune doré (#FFCC00) → Énergie et dynamisme</text:p>
            </text:list-item>
            <text:list-item>
              <text:p text:style-name="P226">Gris clair (#F5F5F5) → Modernité et lisibilité</text:p>
            </text:list-item>
          </text:list>
        </text:list-item>
        <text:list-item>
          <text:p text:style-name="P227"><text:span text:style-name="StrongEmphasis">Typographies :</text:span></text:p>
          <text:list text:continue-numbering="true">
            <text:list-item>
              <text:p text:style-name="P228">Titres :<text:s/><text:span text:style-name="Accentuation">Montserrat Bold</text:span></text:p>
            </text:list-item>
            <text:list-item>
              <text:p text:style-name="P229">Textes :<text:s/><text:span text:style-name="Accentuation">Open Sans Regular</text:span></text:p>
            </text:list-item>
          </text:list>
        </text:list-item>
        <text:list-item>
          <text:p text:style-name="P230"><text:span text:style-name="StrongEmphasis">Style visuel :</text:span></text:p>
          <text:list text:continue-numbering="true">
            <text:list-item>
              <text:p text:style-name="P231">Icônes simples et lisibles</text:p>
            </text:list-item>
            <text:list-item>
              <text:p text:style-name="P232">Bords arrondis, ombres douces</text:p>
            </text:list-item>
            <text:list-item>
              <text:p text:style-name="P233">Mise en avant des boutons d’action (“Contact”, “Demander un devis”)</text:p>
            </text:list-item>
            <text:list-item>
              <text:p text:style-name="P234">Animations légères au survol</text:p>
            </text:list-item>
          </text:list>
        </text:list-item>
      </text:list>
      <text:p text:style-name="P235"/>
      <text:h text:style-name="P236" text:outline-level="2">13. Contraintes et normes</text:h>
      <text:list text:style-name="LFO8" text:continue-numbering="true">
        <text:list-item>
          <text:p text:style-name="P237">Compatibilité navigateurs : Chrome, Edge, Firefox, Safari</text:p>
        </text:list-item>
        <text:list-item>
          <text:p text:style-name="P238">Responsive : mobile-first</text:p>
        </text:list-item>
        <text:list-item>
          <text:p text:style-name="P239">Respect du RGPD</text:p>
        </text:list-item>
        <text:list-item>
          <text:p text:style-name="P240">Normes W3C (HTML/CSS)</text:p>
        </text:list-item>
        <text:list-item>
          <text:p text:style-name="P241">Optimisation SEO (balises meta, titres hiérarchisés, texte alternatif)</text:p>
        </text:list-item>
      </text:list>
      <text:p text:style-name="P242"/>
      <text:h text:style-name="P243" text:outline-level="2">14. Planning prévisionnel</text:h>
      <table:table table:style-name="Table244">
        <table:table-columns>
          <table:table-column table:style-name="TableColumn245"/>
          <table:table-column table:style-name="TableColumn246"/>
          <table:table-column table:style-name="TableColumn247"/>
        </table:table-columns>
        <table:table-header-rows>
          <table:table-row table:style-name="TableRow248">
            <table:table-cell table:style-name="TableCell249">
              <text:p text:style-name="TableHeading">Étape</text:p>
            </table:table-cell>
            <table:table-cell table:style-name="TableCell250">
              <text:p text:style-name="TableHeading">Détail</text:p>
            </table:table-cell>
            <table:table-cell table:style-name="TableCell251">
              <text:p text:style-name="TableHeading">Durée estimée</text:p>
            </table:table-cell>
          </table:table-row>
        </table:table-header-rows>
        <table:table-row table:style-name="TableRow252">
          <table:table-cell table:style-name="TableCell253">
            <text:p text:style-name="TableContents">1. Analyse et maquette</text:p>
          </table:table-cell>
          <table:table-cell table:style-name="TableCell254">
            <text:p text:style-name="TableContents">Moodboard + wireframes (Figma)</text:p>
          </table:table-cell>
          <table:table-cell table:style-name="TableCell255">
            <text:p text:style-name="TableContents">1 semaine</text:p>
          </table:table-cell>
        </table:table-row>
        <table:table-row table:style-name="TableRow256">
          <table:table-cell table:style-name="TableCell257">
            <text:p text:style-name="TableContents">2. Intégration HTML/CSS</text:p>
          </table:table-cell>
          <table:table-cell table:style-name="TableCell258">
            <text:p text:style-name="TableContents">Structure + design responsive</text:p>
          </table:table-cell>
          <table:table-cell table:style-name="TableCell259">
            <text:p text:style-name="TableContents">1<text:s/>semaine</text:p>
          </table:table-cell>
        </table:table-row>
        <table:table-row table:style-name="TableRow260">
          <table:table-cell table:style-name="TableCell261">
            <text:p text:style-name="TableContents">3. Intégration JS</text:p>
          </table:table-cell>
          <table:table-cell table:style-name="TableCell262">
            <text:p text:style-name="TableContents">Animation étoiles + menu burger</text:p>
          </table:table-cell>
          <table:table-cell table:style-name="TableCell263">
            <text:p text:style-name="TableContents">3 jours</text:p>
          </table:table-cell>
        </table:table-row>
        <table:table-row table:style-name="TableRow264">
          <table:table-cell table:style-name="TableCell265">
            <text:p text:style-name="TableContents">4. Développement PHP</text:p>
          </table:table-cell>
          <table:table-cell table:style-name="TableCell266">
            <text:p text:style-name="TableContents">Formulaires + commentaires</text:p>
          </table:table-cell>
          <table:table-cell table:style-name="TableCell267">
            <text:p text:style-name="TableContents">1 semaine</text:p>
          </table:table-cell>
        </table:table-row>
        <table:table-row table:style-name="TableRow268">
          <table:table-cell table:style-name="TableCell269">
            <text:p text:style-name="TableContents">5. Tests et validation</text:p>
          </table:table-cell>
          <table:table-cell table:style-name="TableCell270">
            <text:p text:style-name="TableContents">Tests multi-navigateurs et mobile</text:p>
          </table:table-cell>
          <table:table-cell table:style-name="TableCell271">
            <text:p text:style-name="TableContents">3 jours</text:p>
          </table:table-cell>
        </table:table-row>
        <table:table-row table:style-name="TableRow272">
          <table:table-cell table:style-name="TableCell273">
            <text:p text:style-name="TableContents">6. Mise en ligne</text:p>
          </table:table-cell>
          <table:table-cell table:style-name="TableCell274">
            <text:p text:style-name="TableContents">Configuration serveur + déploiement</text:p>
          </table:table-cell>
          <table:table-cell table:style-name="TableCell275">
            <text:p text:style-name="TableContents">1 jour</text:p>
          </table:table-cell>
        </table:table-row>
      </table:table>
      <text:p text:style-name="P276"/>
      <text:h text:style-name="P277" text:outline-level="2">15. Livrables</text:h>
      <text:list text:style-name="LFO9" text:continue-numbering="true">
        <text:list-item>
          <text:p text:style-name="P278">Maquette graphique (Figma)</text:p>
        </text:list-item>
        <text:list-item>
          <text:p text:style-name="P279">Code source complet (HTML, CSS, JS, PHP)</text:p>
        </text:list-item>
        <text:list-item>
          <text:p text:style-name="P280">Base de données MySQL (structure + données de test)</text:p>
        </text:list-item>
        <text:list-item>
          <text:p text:style-name="P281">Dossier technique</text:p>
        </text:list-item>
        <text:list-item>
          <text:p text:style-name="P282">Cahier des charges (ce document)</text:p>
        </text:list-item>
      </text:list>
      <text:p text:style-name="Textbody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style:font-name="Liberation Serif" style:font-name-asian="NSimSun" fo:font-weight="bold" style:font-weight-asian="bold" style:font-weight-complex="bold" fo:font-size="24pt" style:font-size-asian="24pt" style:font-size-complex="24pt" fo:hyphenate="false"/>
    </style: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Accentuation" style:display-name="Accentuation" style:family="text">
      <style:text-properties fo:font-style="italic" style:font-style-asian="italic" style:font-style-complex="italic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tagiaire</dc:creator>
    <meta:creation-date>2025-09-19T09:14:00Z</meta:creation-date>
    <dc:date>2025-11-17T15:10:00Z</dc:date>
    <meta:template xlink:href="Normal" xlink:type="simple"/>
    <meta:editing-cycles>4</meta:editing-cycles>
    <meta:editing-duration>PT300S</meta:editing-duration>
    <meta:document-statistic meta:page-count="7" meta:paragraph-count="17" meta:word-count="1312" meta:character-count="8516" meta:row-count="60" meta:non-whitespace-character-count="7221"/>
  </office:meta>
</office:document-meta>
</file>